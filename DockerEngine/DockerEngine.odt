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list-style-name=""/>
    <style:style style:name="P4" style:family="paragraph" style:parent-style-name="Heading_20_1">
      <style:paragraph-properties fo:margin-top="0in" fo:margin-bottom="0in" style:contextual-spacing="false" fo:break-before="page"/>
      <style:text-properties officeooo:rsid="002adb72"/>
    </style:style>
    <style:style style:name="P5" style:family="paragraph" style:parent-style-name="Text_20_body">
      <style:paragraph-properties fo:margin-top="0in" fo:margin-bottom="0.0972in" style:contextual-spacing="false"/>
    </style:style>
    <style:style style:name="P6" style:family="paragraph" style:parent-style-name="Heading_20_1">
      <style:text-properties officeooo:rsid="00214c08" officeooo:paragraph-rsid="00214c08"/>
    </style:style>
    <style:style style:name="P7" style:family="paragraph" style:parent-style-name="Heading_20_2">
      <style:text-properties officeooo:paragraph-rsid="002adb72"/>
    </style:style>
    <style:style style:name="P8" style:family="paragraph" style:parent-style-name="Text_20_body">
      <style:paragraph-properties fo:margin-top="0in" fo:margin-bottom="0.0181in" style:contextual-spacing="false"/>
      <style:text-properties officeooo:paragraph-rsid="002dd127"/>
    </style:style>
    <style:style style:name="P9" style:family="paragraph" style:parent-style-name="Standard">
      <style:text-properties officeooo:paragraph-rsid="002dd127"/>
    </style:style>
    <style:style style:name="P10" style:family="paragraph" style:parent-style-name="Text_20_body">
      <style:paragraph-properties fo:margin-top="0in" fo:margin-bottom="0in" style:contextual-spacing="false"/>
      <style:text-properties officeooo:rsid="002dd127" officeooo:paragraph-rsid="002dd127"/>
    </style:style>
    <style:style style:name="P11" style:family="paragraph" style:parent-style-name="Text_20_body">
      <style:paragraph-properties fo:margin-top="0in" fo:margin-bottom="0.0181in" style:contextual-spacing="false"/>
      <style:text-properties officeooo:rsid="002adb72" officeooo:paragraph-rsid="002adb72"/>
    </style:style>
    <style:style style:name="P12" style:family="paragraph" style:parent-style-name="Text_20_body">
      <style:paragraph-properties fo:text-align="center" style:justify-single-word="false"/>
      <style:text-properties officeooo:paragraph-rsid="002adb72"/>
    </style:style>
    <style:style style:name="P13" style:family="paragraph" style:parent-style-name="Text_20_body">
      <style:paragraph-properties fo:margin-top="0in" fo:margin-bottom="0.0181in" style:contextual-spacing="false" fo:text-align="start" style:justify-single-word="false"/>
      <style:text-properties officeooo:paragraph-rsid="002adb7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2adb72"/>
    </style:style>
    <style:style style:name="P16" style:family="paragraph" style:parent-style-name="Text_20_body">
      <style:text-properties officeooo:paragraph-rsid="002c89f4"/>
    </style:style>
    <style:style style:name="P17" style:family="paragraph" style:parent-style-name="Text_20_body">
      <style:paragraph-properties fo:margin-left="0in" fo:text-indent="0in" style:auto-text-indent="false"/>
      <style:text-properties officeooo:paragraph-rsid="002c89f4"/>
    </style:style>
    <style:style style:name="P18" style:family="paragraph" style:parent-style-name="Text_20_body">
      <style:text-properties officeooo:rsid="002c89f4" officeooo:paragraph-rsid="002c89f4"/>
    </style:style>
    <style:style style:name="P19" style:family="paragraph" style:parent-style-name="Text_20_body">
      <style:paragraph-properties fo:text-align="center" style:justify-single-word="false"/>
      <style:text-properties officeooo:rsid="002c89f4" officeooo:paragraph-rsid="002c89f4"/>
    </style:style>
    <style:style style:name="P20" style:family="paragraph" style:parent-style-name="Text_20_body">
      <style:paragraph-properties fo:text-align="start" style:justify-single-word="false"/>
      <style:text-properties officeooo:rsid="002c89f4" officeooo:paragraph-rsid="002c89f4"/>
    </style:style>
    <style:style style:name="P21" style:family="paragraph" style:parent-style-name="Text_20_body">
      <style:text-properties officeooo:paragraph-rsid="002f0fd5"/>
    </style:style>
    <style:style style:name="P22" style:family="paragraph" style:parent-style-name="Text_20_body">
      <style:paragraph-properties fo:margin-top="0in" fo:margin-bottom="0.0181in"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2f0fd5" style:font-weight-asian="bold" style:font-weight-complex="bold"/>
    </style:style>
    <style:style style:name="T1" style:family="text">
      <style:text-properties officeooo:rsid="002adb72"/>
    </style:style>
    <style:style style:name="T2" style:family="text">
      <style:text-properties fo:font-weight="bold" style:font-weight-asian="bold" style:font-weight-complex="bold"/>
    </style:style>
    <style:style style:name="T3" style:family="text">
      <style:text-properties officeooo:rsid="002c89f4"/>
    </style:style>
    <style:style style:name="T4" style:family="text">
      <style:text-properties officeooo:rsid="002f0fd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DOCKER ENG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DOCKER ENGINE</text:p>
          </text:index-title>
          <text:p text:style-name="P1"><text:a xlink:type="simple" xlink:href="#__RefHeading___Toc1586_2876114576" office:name="1. What is Docker?" text:style-name="Index_20_Link" text:visited-style-name="Index_20_Link">1. What is Docker?<text:tab/>2</text:a></text:p>
          <text:p text:style-name="P1"><text:a xlink:type="simple" xlink:href="#__RefHeading___Toc1854_2876114576" office:name="2. Basic Docker Command Groups" text:style-name="Index_20_Link" text:visited-style-name="Index_20_Link">2. Basic Docker Command Groups<text:tab/>2</text:a></text:p>
          <text:p text:style-name="P2"><text:a xlink:type="simple" xlink:href="#__RefHeading___Toc3512_3161625714" office:name="a. Image Management" text:style-name="Index_20_Link" text:visited-style-name="Index_20_Link">a. Image Management<text:tab/>2</text:a></text:p>
          <text:p text:style-name="P2"><text:a xlink:type="simple" xlink:href="#__RefHeading___Toc3514_3161625714" office:name="b. Container Lifecycle Management" text:style-name="Index_20_Link" text:visited-style-name="Index_20_Link">b. Container Lifecycle Management<text:tab/>2</text:a></text:p>
          <text:p text:style-name="P2"><text:a xlink:type="simple" xlink:href="#__RefHeading___Toc3516_3161625714" office:name="c. Network Management" text:style-name="Index_20_Link" text:visited-style-name="Index_20_Link">c. Network Management<text:tab/>3</text:a></text:p>
          <text:p text:style-name="P2"><text:a xlink:type="simple" xlink:href="#__RefHeading___Toc3518_3161625714" office:name="d. Data Persistence" text:style-name="Index_20_Link" text:visited-style-name="Index_20_Link">d. Data Persistence<text:tab/>3</text:a></text:p>
          <text:p text:style-name="P2"><text:a xlink:type="simple" xlink:href="#__RefHeading___Toc3520_3161625714" office:name="e. Troubleshooting &amp; Monitoring" text:style-name="Index_20_Link" text:visited-style-name="Index_20_Link">e. Troubleshooting &amp; Monitoring<text:tab/>4</text:a></text:p>
          <text:p text:style-name="P2"><text:a xlink:type="simple" xlink:href="#__RefHeading___Toc3522_3161625714" office:name="f. Cleaning Up" text:style-name="Index_20_Link" text:visited-style-name="Index_20_Link">f. Cleaning Up<text:tab/>4</text:a></text:p>
          <text:p text:style-name="P1"><text:a xlink:type="simple" xlink:href="#__RefHeading___Toc3644_3161625714" office:name="3. Write a simple Dockerfile" text:style-name="Index_20_Link" text:visited-style-name="Index_20_Link">3. Write a simple Dockerfile<text:tab/>5</text:a></text:p>
          <text:p text:style-name="P2"><text:a xlink:type="simple" xlink:href="#__RefHeading___Toc3646_3161625714" office:name="a. Setup" text:style-name="Index_20_Link" text:visited-style-name="Index_20_Link">a. Setup<text:tab/>5</text:a></text:p>
          <text:p text:style-name="P2"><text:a xlink:type="simple" xlink:href="#__RefHeading___Toc3648_3161625714" office:name="b. Dockerfile" text:style-name="Index_20_Link" text:visited-style-name="Index_20_Link">b. Dockerfile<text:tab/>5</text:a></text:p>
          <text:p text:style-name="P2"><text:a xlink:type="simple" xlink:href="#__RefHeading___Toc3650_3161625714" office:name="c. Build and Run Image" text:style-name="Index_20_Link" text:visited-style-name="Index_20_Link">c. Build and Run Image<text:tab/>5</text:a></text:p>
        </text:index-body>
      </text:table-of-content>
      <text:h text:style-name="P3" text:outline-level="1"/>
      <text:h text:style-name="P4" text:outline-level="1"><text:bookmark-start text:name="__RefHeading___Toc1586_2876114576"/>1. What is Docker?<text:bookmark-end text:name="__RefHeading___Toc1586_2876114576"/></text:h>
      <text:p text:style-name="P5">Docker is a platform that helps you package an application—along with everything it needs to run, such as libraries, environment variables, and configuration files—into a standardized unit called a Container.<text:line-break/>Unlike the boot process of a full Linux operating system (which has to go through complex stages from the Bootloader, to loading the Kernel, to the Init system), a Docker Container shares the host machine's Kernel and only launches the specific processes it needs. Because of this, it starts almost instantly, consumes very few resources, and ensures your application runs exactly the same way across any environment.<text:line-break/>To make it easier to visualize:<text:line-break/>- Image: This is the blueprint or the empty mold. If we compare it to Object-Oriented Programming (OOP), an Image is like a Class. It is entirely read-only.<text:line-break/>- Container: This is the living, running entity created from an Image. Similar to an Object instantiated from a Class, you can spin up hundreds of Containers from a single Image.</text:p>
      <text:h text:style-name="P6" text:outline-level="1"><text:bookmark-start text:name="__RefHeading___Toc1854_2876114576"/>2. Basic Docker Command Groups<text:bookmark-end text:name="__RefHeading___Toc1854_2876114576"/></text:h>
      <text:h text:style-name="P7" text:outline-level="2"><text:bookmark-start text:name="__RefHeading___Toc3512_3161625714"/><text:span text:style-name="T1">a. </text:span>Image Management <text:bookmark-end text:name="__RefHeading___Toc3512_3161625714"/></text:h>
      <text:p text:style-name="P8">These commands are used to interact with your templates.<text:line-break/>- <text:span text:style-name="T2">docker images</text:span>: Lists all the images currently downloaded and available on your local machine.</text:p>
      <text:p text:style-name="P9"><text:span text:style-name="T2">- docker build</text:span>: Reads a text file called a Dockerfile (which contains step-by-step instructions on how to set up your app) and bakes it into a brand new Image.</text:p>
      <text:p text:style-name="P10">Example:</text:p>
      <text:p text:style-name="P8"># Builds an image named 'my_custom_app' using the Dockerfile in the current directory (.)</text:p>
      <text:p text:style-name="P8">docker build -t my_custom_app .<text:line-break/>- <text:span text:style-name="T2">docker save</text:span>: Packages one or more images into a compressed archive (.tar file). This is highly useful when you want to copy an image to a machine that doesn't have internet access.</text:p>
      <text:p text:style-name="P11">Example:</text:p>
      <text:p text:style-name="P12">docker save -o my_ubuntu.tar ubuntu:latest</text:p>
      <text:p text:style-name="P13">- <text:span text:style-name="T2">docker load</text:span>: Loads an image back into Docker from a .tar archive (created previously by the save command).</text:p>
      <text:p text:style-name="P11">Example:</text:p>
      <text:p text:style-name="P12">docker load -i my_ubuntu.tar</text:p>
      <text:h text:style-name="Heading_20_2" text:outline-level="2"><text:bookmark-start text:name="__RefHeading___Toc3514_3161625714"/><text:span text:style-name="T1">b. </text:span>Container Lifecycle Management<text:bookmark-end text:name="__RefHeading___Toc3514_3161625714"/></text:h>
      <text:p text:style-name="Text_20_body">This is the group of commands you will use most often to create and run applications.</text:p>
      <text:p text:style-name="Text_20_body">- <text:span text:style-name="T2">docker create</text:span>: Creates a container from an image but does not start it. This command sets up the environment and allocates an ID, but the processes inside remain paused.</text:p>
      <text:p text:style-name="Text_20_body">Example:</text:p>
      <text:p text:style-name="P14">docker create --name my_app nginx</text:p>
      <text:p text:style-name="Text_20_body"><text:soft-page-break/>- <text:span text:style-name="T2">docker run</text:span>: The "all-in-one" command. It handles pulling the image (if you don't have it locally), creating the container, and starting it up immediately.</text:p>
      <text:p text:style-name="P15">Example:</text:p>
      <text:p text:style-name="P15"># Runs Nginx in detached (background) mode and names it web_server</text:p>
      <text:p text:style-name="Text_20_body">docker run -d --name web_server nginx</text:p>
      <text:p text:style-name="Text_20_body">- <text:span text:style-name="T2">docker ps</text:span>: Lists all currently running containers. It behaves very similarly to the ps command in Linux. Tip: Add the -a flag (docker ps -a) to see absolutely all containers, including those that have stopped or crashed.</text:p>
      <text:p text:style-name="Text_20_body">- <text:span text:style-name="T2">docker exec</text:span>: Allows you to execute a new command inside an already running container. This is the most common way to "shell" into a container to inspect things.</text:p>
      <text:p text:style-name="P16">Example:</text:p>
      <text:p text:style-name="P16"># Opens an interactive bash shell inside the web_server container</text:p>
      <text:p text:style-name="P16">docker exec -it web_server /bin/bash</text:p>
      <text:p text:style-name="P16">- <text:span text:style-name="T2">docker container</text:span>: This is actually a parent command (subcommand group) designed for more explicit container management (e.g., docker container ls does the exact same thing as docker ps, while docker container stop and docker container rm stop and remove them).</text:p>
      <text:h text:style-name="Heading_20_2" text:outline-level="2"><text:bookmark-start text:name="__RefHeading___Toc3516_3161625714"/><text:span text:style-name="T3">c. </text:span>Network Management<text:bookmark-end text:name="__RefHeading___Toc3516_3161625714"/></text:h>
      <text:p text:style-name="Text_20_body">When containers are running, they often need to communicate with each other or the outside world.</text:p>
      <text:p text:style-name="P17"><text:span text:style-name="T2">docker network</text:span>: The master command for managing networks. By default, Docker creates a bridge network (which acts just like a virtual switch). When containers are attached to this bridge, they are assigned internal IP addresses and can ping, communicate, or route packets to one another via Docker's internal Layer 2 and Layer 3 networking.</text:p>
      <text:p text:style-name="P16">Example:</text:p>
      <text:p text:style-name="P17"><text:span text:style-name="T3"># Lists all available networks.</text:span><text:line-break/>docker network ls</text:p>
      <text:p text:style-name="P17"><text:span text:style-name="T3"># Creates a custom virtual switch of your own to isolate network traffic.</text:span><text:line-break/>docker network create my_network</text:p>
      <text:h text:style-name="Heading_20_2" text:outline-level="2"><text:bookmark-start text:name="__RefHeading___Toc3518_3161625714"/>d. Data Persistence<text:bookmark-end text:name="__RefHeading___Toc3518_3161625714"/></text:h>
      <text:p text:style-name="Text_20_body">By design, containers are ephemeral (temporary). If you delete a database container, all the data inside it vanishes. Volumes are like external hard drives you plug into a container so data survives even if the container is destroyed.<text:line-break/>- <text:span text:style-name="T2">docker volume create &lt;volume_name&gt;</text:span>: Creates a storage space managed by Docker on your host machine.<text:line-break/>- <text:span text:style-name="T2">docker volume ls</text:span>: Lists all volumes on your system.<text:line-break/><text:soft-page-break/><text:line-break/>How to use it: <text:span text:style-name="T3">A</text:span>ttach a volume when you run a container using the -v flag.</text:p>
      <text:p text:style-name="P16">Example:</text:p>
      <text:p text:style-name="P15"># Attaches 'my_data' volume to the /var/lib/mysql folder inside the container</text:p>
      <text:p text:style-name="P15">docker run -d --name my_db -v my_data:/var/lib/mysql mysql:latest</text:p>
      <text:h text:style-name="Heading_20_2" text:outline-level="2"><text:bookmark-start text:name="__RefHeading___Toc3520_3161625714"/><text:span text:style-name="T3">e. </text:span>Troubleshooting &amp; Monitoring<text:bookmark-end text:name="__RefHeading___Toc3520_3161625714"/></text:h>
      <text:p text:style-name="Text_20_body">When a container crashes or behaves weirdly, you need x-ray vision to see what's happening inside.<text:line-break/>- <text:span text:style-name="T2">docker logs &lt;container_name&gt;</text:span>: Shows the console output (stdout/stderr) of a container. This is crucial for figuring out why an app crashed on startup. Add -f (follow) to watch logs in real-time like a live feed.</text:p>
      <text:p text:style-name="P18">Example:</text:p>
      <text:p text:style-name="P19">docker logs -f web_server</text:p>
      <text:p text:style-name="P20">- <text:span text:style-name="T2">docker inspect &lt;container_name&gt;</text:span>: Returns a massive block of detailed JSON configuration about the container (its IP address, network settings, volume mounts, state).<text:line-break/><text:line-break/>- <text:span text:style-name="T2">docker stats</text:span>: Opens a live dashboard in your terminal showing CPU, memory, and network usage for all running containers. (Press Ctrl+C to exit).</text:p>
      <text:h text:style-name="Heading_20_2" text:outline-level="2"><text:bookmark-start text:name="__RefHeading___Toc3522_3161625714"/><text:span text:style-name="T3">f. </text:span>Cleaning Up<text:bookmark-end text:name="__RefHeading___Toc3522_3161625714"/></text:h>
      <text:p text:style-name="Text_20_body">Docker downloads large files and keeps old containers around by default. If you don't clean up, it will eventually eat up all your hard drive space.<text:line-break/>- <text:span text:style-name="T2">docker rm &lt;container_name&gt;</text:span>: Deletes a stopped container. (You cannot delete a running container unless you force it with -f).<text:line-break/>- <text:span text:style-name="T2">docker rmi &lt;image_name&gt;</text:span>: Deletes an image. You can only delete an image if no containers (even stopped ones) are currently using it.<text:line-break/>- <text:span text:style-name="T2">docker system prune</text:span>: The "magic cleanup button." It safely deletes all stopped containers, unused networks, and dangling images (images without a name).</text:p>
      <text:p text:style-name="P18">Example:</text:p>
      <text:p text:style-name="P18"># Add -a to also delete unused images (not just dangling ones)</text:p>
      <text:p text:style-name="P18">docker system prune -a</text:p>
      <text:p text:style-name="P16"/>
      <text:p text:style-name="P16"/>
      <text:p text:style-name="P16"/>
      <text:h text:style-name="Heading_20_1" text:outline-level="1"><text:bookmark-start text:name="__RefHeading___Toc3644_3161625714"/><text:soft-page-break/>3. Write a simple Dockerfile<text:bookmark-end text:name="__RefHeading___Toc3644_3161625714"/></text:h>
      <text:h text:style-name="Heading_20_2" text:outline-level="2"><text:bookmark-start text:name="__RefHeading___Toc3646_3161625714"/><text:span text:style-name="T4">a</text:span>. Setup <text:bookmark-end text:name="__RefHeading___Toc3646_3161625714"/></text:h>
      <text:p text:style-name="P21"><text:span text:style-name="T4">Create a </text:span>project folder <text:span text:style-name="T4">and write an </text:span>application code, app.py:</text:p>
      <text:p text:style-name="Text_20_body">print("Container is up and running. Ready for tasks!")</text:p>
      <text:h text:style-name="Heading_20_2" text:outline-level="2"><text:bookmark-start text:name="__RefHeading___Toc3648_3161625714"/>b. Dockerfile<text:bookmark-end text:name="__RefHeading___Toc3648_3161625714"/></text:h>
      <text:p text:style-name="Text_20_body">Create a file in the exact same folder and name it Dockerfile (no file extension). Open it in any text editor and add these instructions:</text:p>
      <text:p text:style-name="P22"># 1. Base Image: Start with a lightweight version of Linux that already has Python installed.</text:p>
      <text:p text:style-name="P22">FROM python:3.9-slim</text:p>
      <text:p text:style-name="P22"># 2. Working Directory: Create a folder inside the container to hold your code.</text:p>
      <text:p text:style-name="P22">WORKDIR /app</text:p>
      <text:p text:style-name="P22"># 3. Copy Files: Copy everything from your local project folder (.) into the container's /app folder (.).</text:p>
      <text:p text:style-name="P22">COPY . .</text:p>
      <text:p text:style-name="P22"># 5. Execution Command: Define the default command to run when the container starts.</text:p>
      <text:p text:style-name="P22">CMD ["python", "app.py"]</text:p>
      <text:p text:style-name="P22"/>
      <text:p text:style-name="Text_20_body"><text:span text:style-name="T2">Understanding the Instructions</text:span><text:line-break/>Every Dockerfile follows a similar logical flow, moving from the operating system level up to your specific application:<text:line-break/><text:span text:style-name="T2">FROM</text:span>: This must always be the first line. Instead of installing an OS from scratch, you pull a pre-built base image from Docker Hub. python:3.9-slim gives you a Debian-based Linux environment with Python 3.9 ready to go.<text:line-break/><text:span text:style-name="T2">WORKDIR</text:span>: This sets the context. Any RUN, CMD, or COPY commands that follow will be executed inside this specific directory in the container.<text:line-break/><text:span text:style-name="T2">COPY</text:span>: The syntax is COPY &lt;source&gt; &lt;destination&gt;. This bridges the gap between your host machine and the isolated container.<text:line-break/><text:span text:style-name="T2">CMD</text:span>: This specifies the command that executes after the container launches.</text:p>
      <text:h text:style-name="Heading_20_2" text:outline-level="2"><text:bookmark-start text:name="__RefHeading___Toc3650_3161625714"/>c. Build and Run Image<text:bookmark-end text:name="__RefHeading___Toc3650_3161625714"/></text:h>
      <text:p text:style-name="Text_20_body"><text:span text:style-name="T4">O</text:span>pen terminal, navigate to the folder containing your Dockerfile, and tell Docker to build it:</text:p>
      <text:p text:style-name="Text_20_body"># The -t flag tags (names) your image 'my_python_app'. </text:p>
      <text:p text:style-name="Text_20_body"># The dot (.) at the end tells Docker to look in the current directory for the Dockerfile.</text:p>
      <text:p text:style-name="P23">docker build -t my_python_app .</text:p>
      <text:p text:style-name="P21">Docker will download the Python base image, copy your files, and package everything together.</text:p>
      <text:p text:style-name="P21">Once it finishes, you can spin up a container from your newly created image:</text:p>
      <text:p text:style-name="P24">docker run my_python_ap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in" fo:margin-bottom="0.0799in" style:contextual-spacing="false" style:page-number="auto"/>
      <style:text-properties style:font-name="Times New Roman" fo:font-family="'Times New Roman'" style:font-style-name="Bold" style:font-family-generic="roman" style:font-pitch="variable"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16:05:37.467251400</meta:creation-date>
    <dc:date>2026-07-07T14:11:13.272921000</dc:date>
    <meta:editing-duration>P21DT3H13M37S</meta:editing-duration>
    <meta:editing-cycles>13</meta:editing-cycles>
    <meta:generator>LibreOffice/25.8.7.2$Windows_X86_64 LibreOffice_project/e9cfafff50477fae0fcf42925ebd2aec2bdc5df4</meta:generator>
    <meta:document-statistic meta:table-count="0" meta:image-count="0" meta:object-count="0" meta:page-count="5" meta:paragraph-count="86" meta:word-count="1335" meta:character-count="8068" meta:non-whitespace-character-count="6819"/>
  </office:meta>
</office:document-meta>
</file>