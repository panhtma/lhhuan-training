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Heading_20_1" style:list-style-name=""/>
    <style:style style:name="P3" style:family="paragraph" style:parent-style-name="Heading_20_1">
      <style:paragraph-properties fo:margin-top="0in" fo:margin-bottom="0in" style:contextual-spacing="false"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text-properties officeooo:rsid="00521a98" officeooo:paragraph-rsid="00521a98"/>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text-properties officeooo:paragraph-rsid="00521a98"/>
    </style:style>
    <style:style style:name="P10" style:family="paragraph" style:parent-style-name="Text_20_body" style:list-style-name="L5"/>
    <style:style style:name="P11" style:family="paragraph" style:parent-style-name="Text_20_body" style:list-style-name="L5">
      <style:text-properties officeooo:rsid="0055e09e" officeooo:paragraph-rsid="0055e09e"/>
    </style:style>
    <style:style style:name="T1" style:family="text">
      <style:text-properties officeooo:rsid="0054b7b6"/>
    </style:style>
    <style:style style:name="T2" style:family="text">
      <style:text-properties officeooo:rsid="00521a9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RUNTIME RESOUR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RUNTIME RESOURCE</text:p>
          </text:index-title>
          <text:p text:style-name="P1"><text:a xlink:type="simple" xlink:href="#__RefHeading___Toc403_3495005077" office:name="1. Code Build Flow" text:style-name="Index_20_Link" text:visited-style-name="Index_20_Link">1. Code Build Flow<text:tab/>2</text:a></text:p>
          <text:p text:style-name="P1"><text:a xlink:type="simple" xlink:href="#__RefHeading___Toc405_3495005077" office:name="2. Debian Files" text:style-name="Index_20_Link" text:visited-style-name="Index_20_Link">2. Debian Files<text:tab/>2</text:a></text:p>
          <text:p text:style-name="P1"><text:a xlink:type="simple" xlink:href="#__RefHeading___Toc407_3495005077" office:name="3. Docker Image Containing the Application" text:style-name="Index_20_Link" text:visited-style-name="Index_20_Link">3. Docker Image Containing the Application<text:tab/>3</text:a></text:p>
          <text:p text:style-name="P1"><text:a xlink:type="simple" xlink:href="#__RefHeading___Toc409_3495005077" office:name="4. Service" text:style-name="Index_20_Link" text:visited-style-name="Index_20_Link">4. Service<text:tab/>3</text:a></text:p>
          <text:p text:style-name="P1"><text:a xlink:type="simple" xlink:href="#__RefHeading___Toc411_3495005077" office:name="5. Application" text:style-name="Index_20_Link" text:visited-style-name="Index_20_Link">5. Application<text:tab/>4</text:a></text:p>
        </text:index-body>
      </text:table-of-content>
      <text:h text:style-name="P2" text:outline-level="1"/>
      <text:h text:style-name="P3" text:outline-level="1"><text:bookmark-start text:name="__RefHeading___Toc403_3495005077"/>1. Code Build Flow<text:bookmark-end text:name="__RefHeading___Toc403_3495005077"/></text:h>
      <text:p text:style-name="Text_20_body">The source code compilation process does not run directly on the physical host environment. Instead, it is fully isolated to ensure consistency. The system determines this through a cross-check mechanism:</text:p>
      <text:list text:style-name="L1">
        <text:list-item>
          <text:p text:style-name="P4">Environment Check (Check in Docker): When you enter a build command such as make, the system checks whether the current process is running on the Host or already inside a Container by looking for the system file /.dockerenv.</text:p>
        </text:list-item>
        <text:list-item>
          <text:p text:style-name="P4">First Make (Triggering the Builder from the Host): If the system detects that it is outside the Host, it enters the corresponding if branch. At this stage, the purpose is not yet to compile the C/C++ code. Instead, the make command is responsible for “starting Docker,” also known as launching the Builder Container.</text:p>
        </text:list-item>
        <text:list-item>
          <text:p text:style-name="P4">Second Make (Compiling Inside the Container): After the Builder Container starts successfully, the external process uses a command similar to docker exec to send another make command into that Container and begin execution there.</text:p>
        </text:list-item>
        <text:list-item>
          <text:p text:style-name="P4">Volume Mount Mechanism: Because the source-code directory is mounted directly from the Host into the Container, the directory structure inside Docker looks exactly the same as outside. Compilation takes place cleanly inside the Container, producing executable files without leaving behind “junk” files or causing library conflicts on the Host machine.</text:p>
        </text:list-item>
      </text:list>
      <text:h text:style-name="Heading_20_1" text:outline-level="1"><text:bookmark-start text:name="__RefHeading___Toc405_3495005077"/>2. Debian Files<text:bookmark-end text:name="__RefHeading___Toc405_3495005077"/></text:h>
      <text:p text:style-name="Text_20_body">Debian installation files <text:span text:style-name="T1">a</text:span>ll packaging configuration <text:span text:style-name="T1">to build deb files</text:span> is located in the debian/ directory, with the key files as follows:</text:p>
      <text:list text:style-name="L2">
        <text:list-item>
          <text:p text:style-name="P5">changelog: This is where release history and version information are declared. For example, if the current version is 1.0.0 and a new update is released, the changes and version bump are recorded here.</text:p>
        </text:list-item>
        <text:list-item>
          <text:p text:style-name="P5">compat: Defines the compatibility level of the debhelper packaging toolchain. In this system, the version is hardcoded as 11.</text:p>
        </text:list-item>
        <text:list-item>
          <text:p text:style-name="P6">file: Lists the files included in the application package, along with the application name, section, and type (optional or mandatory)</text:p>
        </text:list-item>
        <text:list-item>
          <text:p text:style-name="P5">control: This file contains metadata describing the nature of the Application.</text:p>
          <text:list>
            <text:list-item>
              <text:p text:style-name="P5">Source: Declares the source name of the project, for example ios-learning.</text:p>
            </text:list-item>
            <text:list-item>
              <text:p text:style-name="P5">Section: Used to classify the package as an Application, Tools, or Library so the system can recognize it.</text:p>
            </text:list-item>
            <text:list-item>
              <text:p text:style-name="P5">Architecture: Specifies the supported CPU architecture, commonly set to any so it can be built across multiple platforms.</text:p>
            </text:list-item>
            <text:list-item>
              <text:p text:style-name="P5">Depends: Lists the external library packages that the application requires in order to run.</text:p>
            </text:list-item>
            <text:list-item>
              <text:p text:style-name="P5">Description: Provides a general description of the package’s functionality.</text:p>
            </text:list-item>
          </text:list>
        </text:list-item>
        <text:list-item>
          <text:p text:style-name="P5"><text:soft-page-break/>rules : In essence, rules is a Makefile. Debian has default automatic build steps such as dh_auto_build and dh_auto_install. However, to fully control the process, the project uses override_dh_auto_build and override_dh_auto_install to block these default steps. Directly beneath the override command, the system adds a manual make command, pointing back to the original top-level Makefile in the outer directory.</text:p>
        </text:list-item>
      </text:list>
      <text:h text:style-name="Heading_20_1" text:outline-level="1"><text:bookmark-start text:name="__RefHeading___Toc407_3495005077"/>3. Docker Image Containing the Application<text:bookmark-end text:name="__RefHeading___Toc407_3495005077"/></text:h>
      <text:p text:style-name="Text_20_body">Once the .deb files have been packaged successfully, the next step is to “insert” all of these files into a Docker Image so it is ready for deployment. This subsystem is handled inside the docker/ directory:</text:p>
      <text:list text:style-name="L3">
        <text:list-item>
          <text:p text:style-name="P7">Defining Dependencies: The Makefile inside the docker/ directory specifically defines which components this Image depends on. For example, an NTP application will have its own dependency list.</text:p>
        </text:list-item>
        <text:list-item>
          <text:p text:style-name="P7">create_docker_copy_deb Function: The process begins by inheriting from an existing system Base Image, such as docker-base. Then the create_docker_copy_deb function is called to copy the full set of newly built .deb files into this Base Image, install them, and commit the result as a complete Docker Image named after your application.</text:p>
        </text:list-item>
      </text:list>
      <text:h text:style-name="Heading_20_1" text:outline-level="1"><text:bookmark-start text:name="__RefHeading___Toc409_3495005077"/>4. Service<text:bookmark-end text:name="__RefHeading___Toc409_3495005077"/></text:h>
      <text:p text:style-name="Text_20_body">When the Container starts, process management inside it is handled by Systemd. The service configuration file (.service) contains tightly defined sections:</text:p>
      <text:list text:style-name="L4">
        <text:list-item>
          <text:p text:style-name="P8">[Unit]: Defines the Description and startup order through flags such as Requires, which specifies services that must run together, and After/Before, which controls whether the service may start only after another service, such as a database, is ready.</text:p>
        </text:list-item>
        <text:list-item>
          <text:p text:style-name="P8">[Service]: Uses the ExecStart flag to point to an initialization script, usually start.sh. This script is responsible for setting environment variables and loading system configuration before executing the main C++ binary.</text:p>
        </text:list-item>
        <text:list-item>
          <text:p text:style-name="P8">Auto-Start Technique (Enable Service): On Linux, a service is usually in the disabled state, meaning it does not automatically run at startup until you manually enter systemctl enable &lt;service_name&gt;. Under the hood, this command creates a symlink to the .service file and places it into the multi-user.target.wants directory.</text:p>
        </text:list-item>
        <text:list-item>
          <text:p text:style-name="P8">In an automated build environment, since this command cannot be entered manually, engineers apply a technique: the build process automatically creates these symlinks in advance and places them directly into the target directory. As a result, as soon as the Docker Container starts, Systemd detects the symlink and automatically activates the application process without any manual intervention.</text:p>
        </text:list-item>
      </text:list>
      <text:h text:style-name="Heading_20_1" text:outline-level="1"><text:bookmark-start text:name="__RefHeading___Toc411_3495005077"/><text:soft-page-break/>5. Application<text:bookmark-end text:name="__RefHeading___Toc411_3495005077"/></text:h>
      <text:p text:style-name="Text_20_body"><text:span text:style-name="T2">T</text:span>he system follows a distributed architecture design, communicating through a Redis Database using the swss-common library.</text:p>
      <text:list text:style-name="L5">
        <text:list-item>
          <text:p text:style-name="P9">Initializing main() &amp; DB Connector: When the application starts, the main() function configures system logging and loads input parameters. Next, the source code initializes “DB Connectors” to connect to separate Redis database streams such as Config DB for user configuration, App DB for processed configuration, and State DB for the current hardware state.</text:p>
        </text:list-item>
        <text:list-item>
          <text:p text:style-name="P9">Defining the Manager Class: Each network feature, such as VLAN, is wrapped inside its own class, for example VlanManager. This class inherits from a core system Base Class named Orch (Orchestrator).</text:p>
        </text:list-item>
        <text:list-item>
          <text:p text:style-name="P10">Table Subscription Mechanism: The application does not continuously query data through polling, which would waste resources. Instead, the source code defines a list (vector&lt;string&gt;) containing the names of the Tables it needs to monitor, such as CONFIG_VLAN_TABLE. This list is passed directly into the Constructor of the Manager Class. This tells the system: “This application only cares about and subscribes to notifications from these tables.”</text:p>
        </text:list-item>
        <text:list-item>
          <text:p text:style-name="P11">appready: Class manage all application, send message to this class to start application.</text:p>
        </text:list-item>
        <text:list-item>
          <text:p text:style-name="P10">Event Loop &amp; doTask() Callback Function: The main application thread enters an infinite while (true) loop. Inside this loop, the application calls a command to wait for signals, such as Select or an equivalent mechanism.</text:p>
        </text:list-item>
        <text:list-item>
          <text:p text:style-name="P10">Whenever another process changes data in a subscribed Table, for example when a command to create a new VLAN is pushed into Config DB, Redis sends back an Event.</text:p>
        </text:list-item>
        <text:list-item>
          <text:p text:style-name="P10">At this point, the system exits the waiting state and immediately triggers the doTask() function. Here, the source code calls functions such as get_select_table() to determine exactly which table has changed, extract the Key-Value pairs, and pass them down into lower-level C++ logic to program the configuration directly into the physical hardwar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in" fo:margin-bottom="0.0799in" style:contextual-spacing="false" style:page-number="auto"/>
      <style:text-properties style:font-name="Times New Roman" fo:font-family="'Times New Roman'" style:font-style-name="Bold" style:font-family-generic="roman" style:font-pitch="variable"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16:05:37.467251400</meta:creation-date>
    <dc:date>2026-07-10T17:09:23.934906600</dc:date>
    <meta:editing-duration>P21DT11H23M55S</meta:editing-duration>
    <meta:editing-cycles>34</meta:editing-cycles>
    <meta:generator>LibreOffice/25.8.7.3$Windows_X86_64 LibreOffice_project/30742500f2d3eb4366ac312fa33d3dcabdb3eba5</meta:generator>
    <meta:document-statistic meta:table-count="0" meta:image-count="0" meta:object-count="0" meta:page-count="4" meta:paragraph-count="43" meta:word-count="1110" meta:character-count="7155" meta:non-whitespace-character-count="6115"/>
  </office:meta>
</office:document-meta>
</file>