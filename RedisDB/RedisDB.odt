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margin-top="0in" fo:margin-bottom="0in" style:contextual-spacing="false" fo:break-before="page"/>
    </style:style>
    <style:style style:name="P5" style:family="paragraph" style:parent-style-name="Text_20_body">
      <style:text-properties fo:font-weight="normal" officeooo:rsid="003982c2" officeooo:paragraph-rsid="003982c2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3982c2" officeooo:paragraph-rsid="003982c2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3982c2" officeooo:paragraph-rsid="004261ac" style:font-weight-asian="normal" style:font-weight-complex="normal"/>
    </style:style>
    <style:style style:name="P8" style:family="paragraph" style:parent-style-name="Text_20_body">
      <style:text-properties fo:font-weight="normal" officeooo:rsid="004261ac" officeooo:paragraph-rsid="004261ac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3982c2" officeooo:paragraph-rsid="003982c2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3982c2" officeooo:paragraph-rsid="00410048" style:font-weight-asian="normal" style:font-weight-complex="normal"/>
    </style:style>
    <style:style style:name="P11" style:family="paragraph" style:parent-style-name="Text_20_body">
      <style:text-properties fo:font-style="italic" fo:font-weight="normal" officeooo:rsid="003982c2" officeooo:paragraph-rsid="003982c2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font-weight="normal" officeooo:rsid="003982c2" officeooo:paragraph-rsid="003bc1a9" style:font-weight-asian="normal" style:font-weight-complex="normal"/>
    </style:style>
    <style:style style:name="P13" style:family="paragraph" style:parent-style-name="Text_20_body">
      <style:text-properties fo:font-weight="normal" officeooo:rsid="003982c2" officeooo:paragraph-rsid="003afc34" style:font-weight-asian="normal" style:font-weight-complex="normal"/>
    </style:style>
    <style:style style:name="P14" style:family="paragraph" style:parent-style-name="Text_20_body">
      <style:text-properties fo:font-weight="normal" officeooo:rsid="0046b7a7" officeooo:paragraph-rsid="0046b7a7" style:font-weight-asian="normal" style:font-weight-complex="normal"/>
    </style:style>
    <style:style style:name="P15" style:family="paragraph" style:parent-style-name="Text_20_body">
      <style:text-properties fo:font-weight="normal" officeooo:rsid="003982c2" officeooo:paragraph-rsid="0046b7a7" style:font-weight-asian="normal" style:font-weight-complex="normal"/>
    </style:style>
    <style:style style:name="P16" style:family="paragraph" style:parent-style-name="Text_20_body">
      <style:text-properties fo:font-weight="bold" officeooo:rsid="003982c2" officeooo:paragraph-rsid="003982c2" style:font-weight-asian="bold" style:font-weight-complex="bold"/>
    </style:style>
    <style:style style:name="P17" style:family="paragraph" style:parent-style-name="Text_20_body">
      <style:text-properties fo:font-weight="bold" officeooo:rsid="003982c2" officeooo:paragraph-rsid="003afc34" style:font-weight-asian="bold" style:font-weight-complex="bold"/>
    </style:style>
    <style:style style:name="P18" style:family="paragraph" style:parent-style-name="Text_20_body">
      <style:text-properties fo:font-weight="normal" officeooo:rsid="003982c2" officeooo:paragraph-rsid="0045a812" style:font-weight-asian="normal" style:font-weight-complex="normal"/>
    </style:style>
    <style:style style:name="P19" style:family="paragraph" style:parent-style-name="Text_20_body">
      <style:text-properties fo:font-weight="normal" officeooo:rsid="003afc34" officeooo:paragraph-rsid="003afc34" style:font-weight-asian="normal" style:font-weight-complex="normal"/>
    </style:style>
    <style:style style:name="T1" style:family="text">
      <style:text-properties officeooo:rsid="004261ac"/>
    </style:style>
    <style:style style:name="T2" style:family="text">
      <style:text-properties officeooo:rsid="00410048"/>
    </style:style>
    <style:style style:name="T3" style:family="text">
      <style:text-properties officeooo:rsid="003982c2"/>
    </style:style>
    <style:style style:name="T4" style:family="text">
      <style:text-properties officeooo:rsid="003f326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fc34"/>
    </style:style>
    <style:style style:name="T7" style:family="text">
      <style:text-properties fo:font-weight="bold" officeooo:rsid="0046b7a7" style:font-weight-asian="bold" style:font-weight-complex="bold"/>
    </style:style>
    <style:style style:name="T8" style:family="text">
      <style:text-properties officeooo:rsid="0046b7a7"/>
    </style:style>
    <style:style style:name="T9" style:family="text">
      <style:text-properties officeooo:rsid="003bc1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REDIS D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REDIS DB</text:p>
          </text:index-title>
          <text:p text:style-name="P1"><text:a xlink:type="simple" xlink:href="#__RefHeading___Toc427_1494509213" office:name="1. What is Redis DB?" text:style-name="Index_20_Link" text:visited-style-name="Index_20_Link">1. What is Redis DB?<text:tab/>2</text:a></text:p>
          <text:p text:style-name="P1"><text:a xlink:type="simple" xlink:href="#__RefHeading___Toc429_1494509213" office:name="2. Run as a Container (Docker)" text:style-name="Index_20_Link" text:visited-style-name="Index_20_Link">2. Run as a Container (Docker)<text:tab/>2</text:a></text:p>
          <text:p text:style-name="P1"><text:a xlink:type="simple" xlink:href="#__RefHeading___Toc431_1494509213" office:name="3. Redis-cli" text:style-name="Index_20_Link" text:visited-style-name="Index_20_Link">3. Redis-cli<text:tab/>2</text:a></text:p>
          <text:p text:style-name="P2"><text:a xlink:type="simple" xlink:href="#__RefHeading___Toc433_1494509213" office:name="a. The “KEYS” Command" text:style-name="Index_20_Link" text:visited-style-name="Index_20_Link">a. The “KEYS” Command<text:tab/>2</text:a></text:p>
          <text:p text:style-name="P2"><text:a xlink:type="simple" xlink:href="#__RefHeading___Toc435_1494509213" office:name="b. Hash Data Types (HSET, HGET, HGETALL)" text:style-name="Index_20_Link" text:visited-style-name="Index_20_Link">b. Hash Data Types (HSET, HGET, HGETALL)<text:tab/>3</text:a></text:p>
          <text:p text:style-name="P2"><text:a xlink:type="simple" xlink:href="#__RefHeading___Toc437_1494509213" office:name="c. Pub/Sub Mechanism (Publish / Subscribe)" text:style-name="Index_20_Link" text:visited-style-name="Index_20_Link">c. Pub/Sub Mechanism (Publish / Subscribe)<text:tab/>3</text:a></text:p>
          <text:p text:style-name="P2"><text:a xlink:type="simple" xlink:href="#__RefHeading___Toc439_1494509213" office:name="d. Keyspace Notifications" text:style-name="Index_20_Link" text:visited-style-name="Index_20_Link">d. Keyspace Notifications<text:tab/>4</text:a></text:p>
          <text:p text:style-name="P1"><text:a xlink:type="simple" xlink:href="#__RefHeading___Toc441_1494509213" office:name="4. Using Redis with C++ (The “libhiredis” library)" text:style-name="Index_20_Link" text:visited-style-name="Index_20_Link">4. Using Redis with C++ (The “libhiredis” library)<text:tab/>4</text:a></text:p>
        </text:index-body>
      </text:table-of-content>
      <text:h text:style-name="P3" text:outline-level="1"/>
      <text:h text:style-name="P4" text:outline-level="1"><text:bookmark-start text:name="__RefHeading___Toc427_1494509213"/>1. What is Redis DB?<text:bookmark-end text:name="__RefHeading___Toc427_1494509213"/></text:h>
      <text:p text:style-name="P5">Redis(which stands for Remote Dictionary Server) is not a traditional relational database like MySQL or PostgreSQL. It is an In-Memory Data Structure Store.</text:p>
      <text:list text:style-name="L1">
        <text:list-item>
          <text:p text:style-name="P6">Speed:Because it reads and writes data directly in RAM rather than on a physical hard drive (SSD/HDD), Redis is incredibly fast (often delivering sub-millisecond response times).</text:p>
        </text:list-item>
        <text:list-item>
          <text:p text:style-name="P6">Key-Value Model: It operates on a "Key-Value" mechanism. You give it a name (the Key), and it stores your data (the Value) under that name.</text:p>
        </text:list-item>
        <text:list-item>
          <text:p text:style-name="P6">Primary Use Cases: It is most commonly used as a Cache (to speed up websites/applications), a Message Broker (for routing messages), or for Session Management.</text:p>
        </text:list-item>
      </text:list>
      <text:h text:style-name="Heading_20_1" text:outline-level="1" text:is-list-header="true"><text:bookmark-start text:name="__RefHeading___Toc429_1494509213"/>2. Run as a Container (Docker)<text:bookmark-end text:name="__RefHeading___Toc429_1494509213"/></text:h>
      <text:p text:style-name="P5">The fastest and cleanest way to run Redis without cluttering your local machine is by using Docker.</text:p>
      <text:p text:style-name="P5">Open your terminal and run the following command:</text:p>
      <text:p text:style-name="P7">docker <text:span text:style-name="T1">pull </text:span>redis</text:p>
      <text:p text:style-name="P8">#pull redis image</text:p>
      <text:p text:style-name="P9">docker run --name <text:span text:style-name="T2">redis_test_app</text:span> -p 6379:6379 -d redis</text:p>
      <text:p text:style-name="P5">--name my-redis`: Assigns the name "my-redis" to your container.</text:p>
      <text:p text:style-name="P5">`-p 6379:6379`: Maps Redis's default port (6379) from inside the container to your host machine.</text:p>
      <text:p text:style-name="P5">`-d`: Runs the container in the background (detached mode).</text:p>
      <text:p text:style-name="P5"/>
      <text:p text:style-name="P5">To access the Redis command-line interface (redis-cli) inside the running container, execute:</text:p>
      <text:p text:style-name="P10">docker exec -it <text:span text:style-name="T2">redis_test_app</text:span> redis-cli</text:p>
      <text:p text:style-name="P11">You are now inside the Redis environment and can start typing the commands below.</text:p>
      <text:h text:style-name="Heading_20_1" text:outline-level="1"><text:bookmark-start text:name="__RefHeading___Toc431_1494509213"/>3. <text:span text:style-name="T3">R</text:span>edis-cli<text:bookmark-end text:name="__RefHeading___Toc431_1494509213"/></text:h>
      <text:h text:style-name="Heading_20_2" text:outline-level="2" text:is-list-header="true"><text:bookmark-start text:name="__RefHeading___Toc433_1494509213"/><text:span text:style-name="T4">a</text:span>. The “KEYS” Command<text:bookmark-end text:name="__RefHeading___Toc433_1494509213"/></text:h>
      <text:p text:style-name="P5">This command helps you find existing keys in your database based on a pattern.</text:p>
      <text:p text:style-name="P12">KEYS *</text:p>
      <text:p text:style-name="P12"># Fetches ALL keys (NEVER use this in Production as it blocks the Redis thread and can crash your server).</text:p>
      <text:p text:style-name="P12">KEYS user:*</text:p>
      <text:p text:style-name="P12"># Fetches all keys starting with "user:"</text:p>
      <text:h text:style-name="Heading_20_2" text:outline-level="2"><text:bookmark-start text:name="__RefHeading___Toc435_1494509213"/><text:soft-page-break/><text:span text:style-name="T4">b</text:span>. Hash Data Types (HSET, HGET, HGETALL)<text:bookmark-end text:name="__RefHeading___Toc435_1494509213"/></text:h>
      <text:p text:style-name="P5">Instead of storing a simple string, a Hash allows you to store an Object/Struct with multiple field-value pairs. This is perfect for storing user profiles.</text:p>
      <text:p text:style-name="P5"><text:span text:style-name="T5">HSET</text:span> (Storing data):</text:p>
      <text:p text:style-name="P5"/>
      <text:p text:style-name="P9">HSET user:1001 name "John Doe" age 25 city "New York"</text:p>
      <text:p text:style-name="P9"/>
      <text:p text:style-name="P5"><text:span text:style-name="T5">HGET</text:span> (Retrieving a specific field):</text:p>
      <text:p text:style-name="P5"/>
      <text:p text:style-name="P9">HGET user:1001 name</text:p>
      <text:p text:style-name="P5"># Output: "John Doe"</text:p>
      <text:p text:style-name="P5"/>
      <text:p text:style-name="P5"><text:span text:style-name="T5">HGETALL</text:span> (Retrieving the entire Hash):</text:p>
      <text:p text:style-name="P5"/>
      <text:p text:style-name="P9">HGETALL user:1001</text:p>
      <text:p text:style-name="P5"># The output returns both the field names and their values: </text:p>
      <text:p text:style-name="P5"># 1) "name"</text:p>
      <text:p text:style-name="P5"># 2) "John Doe"</text:p>
      <text:p text:style-name="P5"># 3) "age"</text:p>
      <text:p text:style-name="P5"># ...</text:p>
      <text:p text:style-name="P5"/>
      <text:h text:style-name="Heading_20_2" text:outline-level="2"><text:bookmark-start text:name="__RefHeading___Toc437_1494509213"/><text:span text:style-name="T4">c</text:span>. Pub/Sub Mechanism (Publish / Subscribe)<text:bookmark-end text:name="__RefHeading___Toc437_1494509213"/></text:h>
      <text:p text:style-name="P5">Pub/Sub turns Redis into a broadcasting station.</text:p>
      <text:p text:style-name="P5"><text:span text:style-name="T5">Subscribe</text:span>: The listener (the radio).</text:p>
      <text:p text:style-name="P5"><text:span text:style-name="T5">Publish</text:span>: The speaker (the broadcaster).</text:p>
      <text:p text:style-name="P13">→ <text:span text:style-name="T6">Only listen to one </text:span>channel</text:p>
      <text:p text:style-name="P5">Open Terminal 1 (Acting as the listener):</text:p>
      <text:p text:style-name="P9">SUBSCRIBE channel:sports</text:p>
      <text:p text:style-name="P5"># This terminal will now block/pause and wait for incoming messages.</text:p>
      <text:p text:style-name="P5"/>
      <text:p text:style-name="P5"><text:soft-page-break/>Open Terminal 2 (Acting as the speaker):</text:p>
      <text:p text:style-name="P9">PUBLISH channel:sports "Goal! 1-0"</text:p>
      <text:p text:style-name="P5"># Instantly, Terminal 1 will print out the message "Goal! 1-0".</text:p>
      <text:p text:style-name="P5"><text:span text:style-name="T5">PSUBSCRIBE </text:span>(Pattern Subscribe): Subscribe to multiple channels simultaneously using wildcards. </text:p>
      <text:p text:style-name="P9">PSUBSCRIBE channel:<text:span text:style-name="T6">*</text:span></text:p>
      <text:p text:style-name="P5"># Will receive messages from channel:sports, channel:news, channel:music, etc.</text:p>
      <text:p text:style-name="P14">To unsubcribe to a channel, use:</text:p>
      <text:p text:style-name="P15"><text:span text:style-name="T7">UN</text:span><text:span text:style-name="T5">SUBSCRIBE </text:span><text:span text:style-name="T8">channel_name</text:span></text:p>
      <text:p text:style-name="P15"><text:span text:style-name="T7">PUN</text:span><text:span text:style-name="T5">SUBSCRIBE </text:span><text:span text:style-name="T8">channel_name</text:span></text:p>
      <text:h text:style-name="Heading_20_2" text:outline-level="2"><text:bookmark-start text:name="__RefHeading___Toc439_1494509213"/><text:span text:style-name="T4">d</text:span>. Keyspace Notifications<text:bookmark-end text:name="__RefHeading___Toc439_1494509213"/></text:h>
      <text:p text:style-name="P5">This is an incredibly useful feature. Redis can "notify" you via Pub/Sub whenever a key is modified, deleted, or expires.</text:p>
      <text:p text:style-name="P5">By default, this feature is disabled to save CPU cycles. To enable it, use:</text:p>
      <text:p text:style-name="P9">CONFIG SET notify-keyspace-events KEA</text:p>
      <text:p text:style-name="P13"><text:span text:style-name="T6">#</text:span>KEA stands for enabling all Keyspace and Keyevent notifications.</text:p>
      <text:p text:style-name="P5">Example: You want to listen for whenever a key expires:</text:p>
      <text:p text:style-name="P9">PSUBSCRIBE __keyevent@0__:expired</text:p>
      <text:p text:style-name="P5">Whenever any key is deleted because its Time-To-Live (TTL) reached zero, you will receive a notification here. This is great for tasks like automatically canceling a pending order after 15 minutes of non-payment.</text:p>
      <text:h text:style-name="Heading_20_1" text:outline-level="1"><text:bookmark-start text:name="__RefHeading___Toc441_1494509213"/>4. Using Redis with C++ (The “libhiredis” library)<text:bookmark-end text:name="__RefHeading___Toc441_1494509213"/></text:h>
      <text:p text:style-name="P5">“hiredis” is the standard, lightweight C client library for Redis. Since C++ is fully compatible with C, this is the most common library used in C++ applications.</text:p>
      <text:p text:style-name="P16">Step 1: <text:span text:style-name="T6">Write Dockerfile</text:span></text:p>
      <text:p text:style-name="P5">FROM gcc:latest</text:p>
      <text:p text:style-name="P5">WORKDIR /app</text:p>
      <text:p text:style-name="P5">COPY . .</text:p>
      <text:p text:style-name="P5">RUN apt-get update &amp;&amp; apt-get install -y libhiredis-dev</text:p>
      <text:p text:style-name="P5">RUN make</text:p>
      <text:p text:style-name="P5">CMD ["./redis"]</text:p>
      <text:p text:style-name="P17"><text:soft-page-break/>Step <text:span text:style-name="T9">2</text:span>: <text:span text:style-name="T6">Write Makefile</text:span></text:p>
      <text:p text:style-name="P13">CXX = g++</text:p>
      <text:p text:style-name="P13">CXXFLAGS = -std=c++11 -I/usr/local/include/hiredis</text:p>
      <text:p text:style-name="P13">LDFLAGS = -lhiredis</text:p>
      <text:p text:style-name="P13">TARGET = redis</text:p>
      <text:p text:style-name="P13">all: $(TARGET)</text:p>
      <text:p text:style-name="P13">$(TARGET): redis.cpp</text:p>
      <text:p text:style-name="P13"><text:tab/>$(CXX) $(CXXFLAGS) -o $(TARGET) redis.cpp $(LDFLAGS)</text:p>
      <text:p text:style-name="P13">clean:</text:p>
      <text:p text:style-name="P13"><text:tab/>rm -f $(TARGET)</text:p>
      <text:p text:style-name="P5"/>
      <text:p text:style-name="P17">Step <text:span text:style-name="T6">3</text:span>: Write your C++ Code (redis.cpp<text:span text:style-name="T6">)</text:span></text:p>
      <text:p text:style-name="P5">Below is a simple example demonstrating how to connect, use `HSET` and `HGET`, and properly free the memory.</text:p>
      <text:p text:style-name="P5">#include &lt;iostream&gt;</text:p>
      <text:p text:style-name="P5">#include &lt;hiredis/hiredis.h&gt;</text:p>
      <text:p text:style-name="P5">int main() {</text:p>
      <text:p text:style-name="P5"><text:s text:c="4"/>// 1. Connect to the Redis Server (Running on localhost via Docker)</text:p>
      <text:p text:style-name="P5"><text:s text:c="4"/>redisContext *c = redisConnect("127.0.0.1", 6379);</text:p>
      <text:p text:style-name="P5"><text:s text:c="4"/>if (c == NULL || c-&gt;err) {</text:p>
      <text:p text:style-name="P5"><text:s text:c="8"/>if (c) {</text:p>
      <text:p text:style-name="P5"><text:s text:c="12"/>std::cerr &lt;&lt; "Connection error: " &lt;&lt; c-&gt;errstr &lt;&lt; std::endl;</text:p>
      <text:p text:style-name="P5"><text:s text:c="12"/>redisFree(c);</text:p>
      <text:p text:style-name="P5"><text:s text:c="8"/>} else {</text:p>
      <text:p text:style-name="P5"><text:s text:c="12"/>std::cerr &lt;&lt; "Cannot allocate Redis context" &lt;&lt; std::endl;</text:p>
      <text:p text:style-name="P5"><text:s text:c="8"/>}</text:p>
      <text:p text:style-name="P5"><text:s text:c="8"/>return 1;</text:p>
      <text:p text:style-name="P5"><text:s text:c="4"/>}</text:p>
      <text:p text:style-name="P18"><text:s text:c="4"/>std::cout &lt;&lt; "Successfully connected to Redis!" &lt;&lt; std::endl;</text:p>
      <text:p text:style-name="P5"/>
      <text:p text:style-name="P5"><text:soft-page-break/><text:s text:c="4"/>// 2. Execute HSET</text:p>
      <text:p text:style-name="P5"><text:s text:c="4"/>// redisCommand returns a redisReply pointer. YOU MUST FREE IT TO PREVENT MEMORY LEAKS!</text:p>
      <text:p text:style-name="P5"><text:s text:c="4"/>redisReply *reply = (redisReply *)redisCommand(c, "HSET cpp:user:1 name %s age %d", "Gemini", 1);</text:p>
      <text:p text:style-name="P5"><text:s text:c="4"/>std::cout &lt;&lt; "HSET status (Fields added): " &lt;&lt; reply-&gt;integer &lt;&lt; std::endl;</text:p>
      <text:p text:style-name="P5"><text:s text:c="4"/>freeReplyObject(reply); // Crucial</text:p>
      <text:p text:style-name="P5"><text:s text:c="4"/>// 3. Execute HGET</text:p>
      <text:p text:style-name="P5"><text:s text:c="4"/>reply = (redisReply *)redisCommand(c, "HGET cpp:user:1 name");</text:p>
      <text:p text:style-name="P5"><text:s text:c="4"/>if (reply-&gt;type == REDIS_REPLY_STRING) {</text:p>
      <text:p text:style-name="P5"><text:s text:c="8"/>std::cout &lt;&lt; "HGET name: " &lt;&lt; reply-&gt;str &lt;&lt; std::endl;</text:p>
      <text:p text:style-name="P5"><text:s text:c="4"/>}</text:p>
      <text:p text:style-name="P5"><text:s text:c="4"/>freeReplyObject(reply); // Crucial</text:p>
      <text:p text:style-name="P5"><text:s text:c="4"/>// 4. Disconnect and free context</text:p>
      <text:p text:style-name="P5"><text:s text:c="4"/>redisFree(c);</text:p>
      <text:p text:style-name="P5"><text:s text:c="4"/>return 0;</text:p>
      <text:p text:style-name="P5">}</text:p>
      <text:p text:style-name="P5"/>
      <text:p text:style-name="P16">Step <text:span text:style-name="T9">4</text:span>: Compile and Run <text:span text:style-name="T6">with Docker</text:span></text:p>
      <text:p text:style-name="P19">docker build -t redis_test_app .</text:p>
      <text:p text:style-name="P19">docker run redis_test_app</text:p>
      <text:p text:style-name="P13">Successfully connected to Redis!</text:p>
      <text:p text:style-name="P19"><text:span text:style-name="T3">HSET status (Fields added)</text:span>: 2</text:p>
      <text:p text:style-name="P19">HGET name: Jo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in" fo:margin-bottom="0.0799in" style:contextual-spacing="false" style:page-number="auto"/>
      <style:text-properties style:font-name="Times New Roman" fo:font-family="'Times New Roman'" style:font-style-name="Bold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16:05:37.467251400</meta:creation-date>
    <dc:date>2026-07-08T17:07:02.108403100</dc:date>
    <meta:editing-duration>P21DT8H20M4S</meta:editing-duration>
    <meta:editing-cycles>28</meta:editing-cycles>
    <meta:generator>LibreOffice/25.8.7.2$Windows_X86_64 LibreOffice_project/e9cfafff50477fae0fcf42925ebd2aec2bdc5df4</meta:generator>
    <meta:document-statistic meta:table-count="0" meta:image-count="0" meta:object-count="0" meta:page-count="6" meta:paragraph-count="129" meta:word-count="896" meta:character-count="5781" meta:non-whitespace-character-count="4867"/>
  </office:meta>
</office:document-meta>
</file>